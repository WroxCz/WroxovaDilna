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2">
      <style:paragraph-properties fo:margin-top="0cm" fo:margin-bottom="0cm" style:contextual-spacing="false"/>
    </style:style>
    <style:style style:name="P3" style:family="paragraph" style:parent-style-name="Text_20_body" style:list-style-name="L3">
      <style:paragraph-properties fo:margin-top="0cm" fo:margin-bottom="0cm" style:contextual-spacing="false"/>
    </style:style>
    <style:style style:name="P4" style:family="paragraph" style:parent-style-name="Text_20_body" style:list-style-name="L4">
      <style:paragraph-properties fo:margin-top="0cm" fo:margin-bottom="0cm" style:contextual-spacing="false"/>
    </style:style>
    <style:style style:name="P5" style:family="paragraph" style:parent-style-name="Text_20_body" style:list-style-name="L5">
      <style:paragraph-properties fo:margin-top="0cm" fo:margin-bottom="0cm" style:contextual-spacing="false"/>
    </style:style>
    <style:style style:name="P6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ojekt SrdceLM</text:p>
      <text:p text:style-name="Standard"/>
      <text:p text:style-name="Standard">Cíl:</text:p>
      <text:p text:style-name="Standard">Navrhnout životní cyklus zakázky v STC Luna od vytvoření košíku až po archivaci.</text:p>
      <text:p text:style-name="Standard"/>
      <text:p text:style-name="Standard">────────────────────────</text:p>
      <text:p text:style-name="Standard"/>
      <text:p text:style-name="Standard">🏭 Sklad</text:p>
      <text:p text:style-name="Standard"><text:s text:c="6"/>│</text:p>
      <text:p text:style-name="Standard"><text:s text:c="6"/>▼</text:p>
      <text:p text:style-name="Standard">🧩 Modely</text:p>
      <text:p text:style-name="Standard"><text:s text:c="6"/>│</text:p>
      <text:p text:style-name="Standard"><text:s text:c="6"/>▼</text:p>
      <text:p text:style-name="Standard">🛒 Košík</text:p>
      <text:p text:style-name="Standard"><text:s text:c="6"/>│</text:p>
      <text:p text:style-name="Standard"><text:s text:c="6"/>▼</text:p>
      <text:p text:style-name="Standard">📂 Zakázkový spis</text:p>
      <text:p text:style-name="Standard"><text:s text:c="6"/>│</text:p>
      <text:p text:style-name="Standard"><text:s/>┌────┼──────────┐</text:p>
      <text:p text:style-name="Standard"><text:s/>│ <text:s text:c="3"/>│ <text:s text:c="9"/>│</text:p>
      <text:p text:style-name="Standard">💳 Platba <text:s text:c="2"/>🖨️ Výroba <text:s text:c="2"/>📦 Expedice</text:p>
      <text:p text:style-name="Standard"><text:s/>│ <text:s text:c="3"/>│ <text:s text:c="9"/>│</text:p>
      <text:p text:style-name="Standard"><text:s/>└────┴──────────┘</text:p>
      <text:p text:style-name="Standard"><text:s text:c="6"/>│</text:p>
      <text:p text:style-name="Standard"><text:s text:c="6"/>▼</text:p>
      <text:p text:style-name="Standard">📚 Archiv</text:p>
      <text:p text:style-name="Standard"/>
      <text:p text:style-name="Standard"/>
      <text:p text:style-name="Standard"/>
      <text:list text:style-name="L1">
        <text:list-item>
          <text:p text:style-name="P1"><text:span text:style-name="Strong_20_Emphasis">Zakázkový spis je srdcem STC Luna.</text:span> </text:p>
        </text:list-item>
      </text:list>
      <text:list text:style-name="L2">
        <text:list-item>
          <text:p text:style-name="P2"><text:span text:style-name="Strong_20_Emphasis">Košík je poslední veřejný krok zákazníka.</text:span> </text:p>
        </text:list-item>
      </text:list>
      <text:list text:style-name="L3">
        <text:list-item>
          <text:p text:style-name="P3"><text:span text:style-name="Strong_20_Emphasis">Po kliknutí na "Odeslat objednávku" vzniká zakázkový spis.</text:span> </text:p>
        </text:list-item>
      </text:list>
      <text:list text:style-name="L4">
        <text:list-item>
          <text:p text:style-name="P4"><text:span text:style-name="Strong_20_Emphasis">Na zakázkovém spisu pracují interní role (Magos, Admin...).</text:span> </text:p>
        </text:list-item>
      </text:list>
      <text:list text:style-name="L5">
        <text:list-item>
          <text:p text:style-name="P5"><text:span text:style-name="Strong_20_Emphasis">Archiv je samostatná část systému určená pro uzavřené zakázky.</text:span> </text:p>
        </text:list-item>
      </text:list>
      <text:list text:style-name="L6">
        <text:list-item>
          <text:p text:style-name="P6"><text:span text:style-name="Strong_20_Emphasis">Archiv není pracovní prostředí, ale evidence historie firmy</text:span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03T19:12:30.961778500</meta:creation-date>
    <dc:date>2026-07-03T19:12:51.632463000</dc:date>
    <meta:editing-duration>PT20S</meta:editing-duration>
    <meta:editing-cycles>1</meta:editing-cycles>
    <meta:document-statistic meta:table-count="0" meta:image-count="0" meta:object-count="0" meta:page-count="1" meta:paragraph-count="29" meta:word-count="102" meta:character-count="661" meta:non-whitespace-character-count="502"/>
    <meta:generator>LibreOffice/26.2.4.2$Windows_X86_64 LibreOffice_project/0229ac93fcf0d7cbc6376066c6f35021cef002dc</meta:generator>
  </office:meta>
</office:document-meta>
</file>