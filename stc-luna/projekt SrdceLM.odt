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 style:list-style-name="L3">
      <style:paragraph-properties fo:margin-top="0cm" fo:margin-bottom="0cm" style:contextual-spacing="false"/>
    </style:style>
    <style:style style:name="P4" style:family="paragraph" style:parent-style-name="Text_20_body" style:list-style-name="L4">
      <style:paragraph-properties fo:margin-top="0cm" fo:margin-bottom="0cm" style:contextual-spacing="false"/>
    </style:style>
    <style:style style:name="P5" style:family="paragraph" style:parent-style-name="Text_20_body" style:list-style-name="L5">
      <style:paragraph-properties fo:margin-top="0cm" fo:margin-bottom="0cm" style:contextual-spacing="false"/>
    </style:style>
    <style:style style:name="P6" style:family="paragraph" style:parent-style-name="Text_20_body" style:list-style-name="L6"/>
    <style:style style:name="P7" style:family="paragraph" style:parent-style-name="Text_20_body">
      <style:paragraph-properties fo:margin-left="1cm" fo:margin-right="1cm" fo:text-indent="0cm" style:auto-text-indent="false"/>
    </style:style>
    <style:style style:name="P8" style:family="paragraph" style:parent-style-name="Text_20_body" style:list-style-name="L7">
      <style:paragraph-properties fo:margin-top="0cm" fo:margin-bottom="0cm" style:contextual-spacing="false"/>
    </style:style>
    <style:style style:name="P9" style:family="paragraph" style:parent-style-name="Text_20_body" style:list-style-name="L7"/>
    <style:style style:name="T1" style:family="text">
      <style:text-properties officeooo:rsid="001ec2c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jekt SrdceLM</text:p>
      <text:p text:style-name="Standard"/>
      <text:p text:style-name="Standard">Cíl:</text:p>
      <text:p text:style-name="Standard">Navrhnout životní cyklus zakázky v STC Luna od vytvoření košíku až po archivaci.</text:p>
      <text:p text:style-name="Standard"/>
      <text:p text:style-name="Standard">────────────────────────</text:p>
      <text:p text:style-name="Standard"/>
      <text:p text:style-name="Standard">🏭 Sklad</text:p>
      <text:p text:style-name="Standard"><text:s text:c="6"/>│</text:p>
      <text:p text:style-name="Standard"><text:s text:c="6"/>▼</text:p>
      <text:p text:style-name="Standard">🧩 Modely</text:p>
      <text:p text:style-name="Standard"><text:s text:c="6"/>│</text:p>
      <text:p text:style-name="Standard"><text:s text:c="6"/>▼</text:p>
      <text:p text:style-name="Standard">🛒 Košík</text:p>
      <text:p text:style-name="Standard"><text:s text:c="6"/>│</text:p>
      <text:p text:style-name="Standard"><text:s text:c="6"/>▼</text:p>
      <text:p text:style-name="Standard">📂 Zakázkový spis</text:p>
      <text:p text:style-name="Standard"><text:s text:c="6"/>│</text:p>
      <text:p text:style-name="Standard"><text:s/>┌────┼──────────┐</text:p>
      <text:p text:style-name="Standard"><text:s/>│ <text:s text:c="3"/>│ <text:s text:c="9"/>│</text:p>
      <text:p text:style-name="Standard">💳 Platba <text:s text:c="2"/>🖨️ Výroba <text:s text:c="2"/>📦 Expedice</text:p>
      <text:p text:style-name="Standard"><text:s/>│ <text:s text:c="3"/>│ <text:s text:c="9"/>│</text:p>
      <text:p text:style-name="Standard"><text:s/>└────┴──────────┘</text:p>
      <text:p text:style-name="Standard"><text:s text:c="6"/>│</text:p>
      <text:p text:style-name="Standard"><text:s text:c="6"/>▼</text:p>
      <text:p text:style-name="Standard">📚 Archiv</text:p>
      <text:p text:style-name="Standard"/>
      <text:p text:style-name="Standard"/>
      <text:p text:style-name="Standard">Pravidl<text:span text:style-name="T1">a</text:span> SrdceLM: </text:p>
      <text:list text:style-name="L1">
        <text:list-item>
          <text:p text:style-name="P1"><text:span text:style-name="Strong_20_Emphasis">Zakázkový spis je srdcem STC Luna.</text:span> </text:p>
        </text:list-item>
      </text:list>
      <text:list text:style-name="L2">
        <text:list-item>
          <text:p text:style-name="P2"><text:span text:style-name="Strong_20_Emphasis">Košík je poslední veřejný krok zákazníka.</text:span> </text:p>
        </text:list-item>
      </text:list>
      <text:list text:style-name="L3">
        <text:list-item>
          <text:p text:style-name="P3"><text:span text:style-name="Strong_20_Emphasis">Po kliknutí na "Odeslat objednávku" vzniká zakázkový spis.</text:span> </text:p>
        </text:list-item>
      </text:list>
      <text:list text:style-name="L4">
        <text:list-item>
          <text:p text:style-name="P4"><text:span text:style-name="Strong_20_Emphasis">Na zakázkovém spisu pracují interní role (Magos, Admin...).</text:span> </text:p>
        </text:list-item>
      </text:list>
      <text:list text:style-name="L5">
        <text:list-item>
          <text:p text:style-name="P5"><text:span text:style-name="Strong_20_Emphasis">Archiv je samostatná část systému určená pro uzavřené zakázky.</text:span> </text:p>
        </text:list-item>
      </text:list>
      <text:list text:style-name="L6">
        <text:list-item>
          <text:p text:style-name="P6"><text:span text:style-name="Strong_20_Emphasis">Archiv není pracovní prostředí, ale evidence historie firmy</text:span> </text:p>
        </text:list-item>
      </text:list>
      <text:p text:style-name="P7"><text:span text:style-name="Strong_20_Emphasis">Existuje pouze jeden Zakázkový spis.</text:span></text:p>
      <text:p text:style-name="Text_20_body">Obsahuje vždy všechna data:</text:p>
      <text:list text:style-name="L7">
        <text:list-item>
          <text:p text:style-name="P8">zákazník, </text:p>
        </text:list-item>
        <text:list-item>
          <text:p text:style-name="P8">objednávku, </text:p>
        </text:list-item>
        <text:list-item>
          <text:p text:style-name="P8">výrobu, </text:p>
        </text:list-item>
        <text:list-item>
          <text:p text:style-name="P8">platbu, </text:p>
        </text:list-item>
        <text:list-item>
          <text:p text:style-name="P8">expedici, </text:p>
        </text:list-item>
        <text:list-item>
          <text:p text:style-name="P8">historii, </text:p>
        </text:list-item>
        <text:list-item>
          <text:p text:style-name="P8">přílohy, </text:p>
        </text:list-item>
        <text:list-item>
          <text:p text:style-name="P9">vše ostatní.</text:p>
        </text:list-item>
      </text:list>
      <text:p text:style-name="Text_20_body">Nikdy nebudu navrhovat druhý spis ani oddělenou výrobní verzi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3T19:12:30.961778500</meta:creation-date>
    <dc:date>2026-07-03T21:39:34.430214200</dc:date>
    <meta:editing-duration>PT1M2S</meta:editing-duration>
    <meta:editing-cycles>3</meta:editing-cycles>
    <meta:generator>LibreOffice/26.2.4.2$Windows_X86_64 LibreOffice_project/0229ac93fcf0d7cbc6376066c6f35021cef002dc</meta:generator>
    <meta:document-statistic meta:table-count="0" meta:image-count="0" meta:object-count="0" meta:page-count="1" meta:paragraph-count="41" meta:word-count="139" meta:character-count="892" meta:non-whitespace-character-count="707"/>
  </office:meta>
</office:document-meta>
</file>