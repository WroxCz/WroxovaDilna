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32pt" fo:font-weight="bold" officeooo:rsid="0014bd58" officeooo:paragraph-rsid="0014bd58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rsid="0014bd58" officeooo:paragraph-rsid="0014bd58"/>
    </style:style>
    <style:style style:name="P3" style:family="paragraph" style:parent-style-name="Heading_20_1">
      <style:text-properties officeooo:rsid="0014bd58" officeooo:paragraph-rsid="0014bd58"/>
    </style:style>
    <style:style style:name="P4" style:family="paragraph" style:parent-style-name="Heading_20_2">
      <style:text-properties officeooo:rsid="0014bd58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14bd58"/>
    </style:style>
    <style:style style:name="P6" style:family="paragraph" style:parent-style-name="Text_20_body" style:list-style-name="L1">
      <style:text-properties officeooo:rsid="0014bd58"/>
    </style:style>
    <style:style style:name="P7" style:family="paragraph" style:parent-style-name="Horizontal_20_Line">
      <style:text-properties officeooo:rsid="0014bd58"/>
    </style:style>
    <style:style style:name="P8" style:family="paragraph" style:parent-style-name="Heading_20_3">
      <style:text-properties officeooo:rsid="0014bd58"/>
    </style:style>
    <style:style style:name="P9" style:family="paragraph" style:parent-style-name="Text_20_body">
      <style:text-properties officeooo:rsid="0014bd58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officeooo:rsid="0014bd58"/>
    </style:style>
    <style:style style:name="P11" style:family="paragraph" style:parent-style-name="Text_20_body" style:list-style-name="L2">
      <style:text-properties officeooo:rsid="0014bd58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officeooo:rsid="0014bd58"/>
    </style:style>
    <style:style style:name="P13" style:family="paragraph" style:parent-style-name="Text_20_body" style:list-style-name="L3">
      <style:text-properties officeooo:rsid="0014bd58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officeooo:rsid="0014bd58"/>
    </style:style>
    <style:style style:name="P15" style:family="paragraph" style:parent-style-name="Text_20_body" style:list-style-name="L4">
      <style:text-properties officeooo:rsid="0014bd58"/>
    </style:style>
    <style:style style:name="P1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rsid="0014bd58"/>
    </style:style>
    <style:style style:name="P17" style:family="paragraph" style:parent-style-name="Text_20_body" style:list-style-name="L5">
      <style:paragraph-properties fo:margin-top="0cm" fo:margin-bottom="0cm" style:contextual-spacing="false"/>
      <style:text-properties officeooo:rsid="0014bd58"/>
    </style:style>
    <style:style style:name="P18" style:family="paragraph" style:parent-style-name="Text_20_body" style:list-style-name="L5">
      <style:text-properties officeooo:rsid="0014bd58"/>
    </style:style>
    <style:style style:name="P19" style:family="paragraph" style:parent-style-name="Text_20_body" style:list-style-name="L6">
      <style:text-properties officeooo:rsid="0014bd58"/>
    </style:style>
    <style:style style:name="P20" style:family="paragraph" style:parent-style-name="Text_20_body" style:list-style-name="L7">
      <style:text-properties officeooo:rsid="0014bd58"/>
    </style:style>
    <style:style style:name="P21" style:family="paragraph" style:parent-style-name="Text_20_body" style:list-style-name="L8">
      <style:paragraph-properties fo:margin-top="0cm" fo:margin-bottom="0cm" style:contextual-spacing="false"/>
      <style:text-properties officeooo:rsid="0014bd58"/>
    </style:style>
    <style:style style:name="P22" style:family="paragraph" style:parent-style-name="Text_20_body" style:list-style-name="L8">
      <style:text-properties officeooo:rsid="0014bd58"/>
    </style:style>
    <style:style style:name="P23" style:family="paragraph" style:parent-style-name="Heading_20_1">
      <style:text-properties officeooo:rsid="0014bd58"/>
    </style:style>
    <style:style style:name="P24" style:family="paragraph" style:parent-style-name="Text_20_body" style:list-style-name="L9">
      <style:paragraph-properties fo:margin-top="0cm" fo:margin-bottom="0cm" style:contextual-spacing="false"/>
      <style:text-properties officeooo:rsid="0014bd58"/>
    </style:style>
    <style:style style:name="P25" style:family="paragraph" style:parent-style-name="Text_20_body" style:list-style-name="L9">
      <style:text-properties officeooo:rsid="0014bd58"/>
    </style:style>
    <style:style style:name="P26" style:family="paragraph" style:parent-style-name="Text_20_body" style:list-style-name="L10">
      <style:paragraph-properties fo:margin-top="0cm" fo:margin-bottom="0cm" style:contextual-spacing="false"/>
      <style:text-properties officeooo:rsid="0014bd58"/>
    </style:style>
    <style:style style:name="P27" style:family="paragraph" style:parent-style-name="Text_20_body" style:list-style-name="L10">
      <style:text-properties officeooo:rsid="0014bd58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Helenka – fotky</text:p>
      <text:p text:style-name="P2"/>
      <text:h text:style-name="P3" text:outline-level="1">📷 Životní cyklus fotografií – zbývá dodělat</text:h>
      <text:h text:style-name="P4" text:outline-level="2">✅ Hotovo</text:h>
      <text:list text:style-name="L1">
        <text:list-item>
          <text:p text:style-name="P5">✅ Nahrání fotografie do Firebase Storage. </text:p>
        </text:list-item>
        <text:list-item>
          <text:p text:style-name="P5">✅ Změna fotografie → stará fotografie se smaže. </text:p>
        </text:list-item>
        <text:list-item>
          <text:p text:style-name="P5">✅ Odebrání destičky → fotografie se smaže. </text:p>
        </text:list-item>
        <text:list-item>
          <text:p text:style-name="P6">✅ Smazání položky z košíku → smažou se všechny fotografie dané položky. </text:p>
        </text:list-item>
      </text:list>
      <text:p text:style-name="P7"/>
      <text:h text:style-name="P4" text:outline-level="2">🔲 Zbývá</text:h>
      <text:h text:style-name="P8" text:outline-level="3">1. Zavření stránky bez objednání</text:h>
      <text:p text:style-name="P9"><text:span text:style-name="Strong_20_Emphasis">Stav:</text:span> Neřešeno</text:p>
      <text:p text:style-name="P9">Scénář:</text:p>
      <text:list text:style-name="L2">
        <text:list-item>
          <text:p text:style-name="P10">zákazník nahraje fotku, </text:p>
        </text:list-item>
        <text:list-item>
          <text:p text:style-name="P10">zavře prohlížeč, </text:p>
        </text:list-item>
        <text:list-item>
          <text:p text:style-name="P10">nebo odejde z webu, </text:p>
        </text:list-item>
        <text:list-item>
          <text:p text:style-name="P11">fotografie zůstane ve Storage. </text:p>
        </text:list-item>
      </text:list>
      <text:p text:style-name="P9"><text:span text:style-name="Strong_20_Emphasis">Řešení:</text:span></text:p>
      <text:list text:style-name="L3">
        <text:list-item>
          <text:p text:style-name="P12">pravidelný úklid složky <text:span text:style-name="Source_20_Text">litofan/temp</text:span> </text:p>
        </text:list-item>
        <text:list-item>
          <text:p text:style-name="P13">mazat soubory starší než např. 24 hodin, které nejsou navázané na objednávku. </text:p>
        </text:list-item>
      </text:list>
      <text:p text:style-name="P7"/>
      <text:h text:style-name="P8" text:outline-level="3">2. Odeslání objednávky</text:h>
      <text:p text:style-name="P9"><text:span text:style-name="Strong_20_Emphasis">Stav:</text:span> Čeká na archiv</text:p>
      <text:p text:style-name="P9">Při vytvoření objednávky se pouze uloží:</text:p>
      <text:list text:style-name="L4">
        <text:list-item>
          <text:p text:style-name="P14"><text:span text:style-name="Source_20_Text">storagePath</text:span> </text:p>
        </text:list-item>
        <text:list-item>
          <text:p text:style-name="P14"><text:span text:style-name="Source_20_Text">storageFileName</text:span> </text:p>
        </text:list-item>
        <text:list-item>
          <text:p text:style-name="P15"><text:span text:style-name="Source_20_Text">imageUrl</text:span> </text:p>
        </text:list-item>
      </text:list>
      <text:p text:style-name="P9">Fotografie se <text:span text:style-name="Strong_20_Emphasis">nesmí mazat</text:span>, protože je potřeba pro výrobu.</text:p>
      <text:p text:style-name="P7"/>
      <text:h text:style-name="P8" text:outline-level="3">3. Stav objednávky = <text:span text:style-name="Strong_20_Emphasis">DOKONČENO</text:span></text:h>
      <text:p text:style-name="P9"><text:span text:style-name="Strong_20_Emphasis">Stav:</text:span> Čeká na dokončení archivu</text:p>
      <text:p text:style-name="P9"><text:soft-page-break/>Po změně stavu:</text:p>
      <text:section text:style-name="Sect1" text:name="code-block-viewer">
        <text:p text:style-name="P16"><text:span text:style-name="Source_20_Text">DOKONČENO</text:span></text:p>
      </text:section>
      <text:p text:style-name="P9">automaticky:</text:p>
      <text:list text:style-name="L5">
        <text:list-item>
          <text:p text:style-name="P17">projít všechny <text:span text:style-name="Source_20_Text">plates</text:span> </text:p>
        </text:list-item>
        <text:list-item>
          <text:p text:style-name="P17">smazat všechny fotografie ze Storage </text:p>
        </text:list-item>
        <text:list-item>
          <text:p text:style-name="P18">objednávka zůstává ve Firestore </text:p>
        </text:list-item>
      </text:list>
      <text:p text:style-name="P7"/>
      <text:h text:style-name="P8" text:outline-level="3">4. Stav objednávky = <text:span text:style-name="Strong_20_Emphasis">STORNO</text:span></text:h>
      <text:p text:style-name="P9"><text:span text:style-name="Strong_20_Emphasis">Stav:</text:span> Čeká na dokončení archivu</text:p>
      <text:p text:style-name="P9">Stejná logika jako DOKONČENO.</text:p>
      <text:p text:style-name="P9">Fotografie už nejsou potřeba.</text:p>
      <text:p text:style-name="P7"/>
      <text:h text:style-name="P8" text:outline-level="3">5. Ruční smazání objednávky z archivu</text:h>
      <text:p text:style-name="P9"><text:span text:style-name="Strong_20_Emphasis">Stav:</text:span> Čeká na dokončení archivu</text:p>
      <text:p text:style-name="P9">Nejdřív:</text:p>
      <text:list text:style-name="L6">
        <text:list-item>
          <text:p text:style-name="P19">smazat všechny fotografie </text:p>
        </text:list-item>
      </text:list>
      <text:p text:style-name="P9">potom:</text:p>
      <text:list text:style-name="L7">
        <text:list-item>
          <text:p text:style-name="P20">smazat dokument z Firestore </text:p>
        </text:list-item>
      </text:list>
      <text:p text:style-name="P7"/>
      <text:h text:style-name="P8" text:outline-level="3">6. Bezpečnostní kontrola</text:h>
      <text:p text:style-name="P9"><text:span text:style-name="Strong_20_Emphasis">Volitelné</text:span></text:p>
      <text:p text:style-name="P9">Když <text:span text:style-name="Source_20_Text">deleteObject()</text:span> selže:</text:p>
      <text:list text:style-name="L8">
        <text:list-item>
          <text:p text:style-name="P21">zapsat chybu do konzole </text:p>
        </text:list-item>
        <text:list-item>
          <text:p text:style-name="P21">pokračovat dál </text:p>
        </text:list-item>
        <text:list-item>
          <text:p text:style-name="P22">nikdy nezablokovat práci administrátora </text:p>
        </text:list-item>
      </text:list>
      <text:p text:style-name="P7"/>
      <text:h text:style-name="P23" text:outline-level="1">Celkový stav</text:h>
      <text:h text:style-name="P8" text:outline-level="3">✅ Před objednávkou</text:h>
      <text:p text:style-name="P9"><text:span text:style-name="Strong_20_Emphasis">100 % hotovo</text:span></text:p>
      <text:list text:style-name="L9">
        <text:list-item>
          <text:p text:style-name="P24">upload </text:p>
        </text:list-item>
        <text:list-item>
          <text:p text:style-name="P24">výměna fotografie </text:p>
        </text:list-item>
        <text:list-item>
          <text:p text:style-name="P24">smazání destičky </text:p>
        </text:list-item>
        <text:list-item>
          <text:p text:style-name="P25"><text:soft-page-break/>smazání z košíku </text:p>
        </text:list-item>
      </text:list>
      <text:h text:style-name="P8" text:outline-level="3">🟡 Po objednávce</text:h>
      <text:p text:style-name="P9"><text:span text:style-name="Strong_20_Emphasis">Čeká na dokončení archivu</text:span></text:p>
      <text:list text:style-name="L10">
        <text:list-item>
          <text:p text:style-name="P26">DOKONČENO </text:p>
        </text:list-item>
        <text:list-item>
          <text:p text:style-name="P26">STORNO </text:p>
        </text:list-item>
        <text:list-item>
          <text:p text:style-name="P26">ruční smazání </text:p>
        </text:list-item>
        <text:list-item>
          <text:p text:style-name="P27">úklid sirotků </text:p>
        </text:list-item>
      </text:list>
      <text:p text:style-name="P7"/>
      <text:p text:style-name="P9">Myslím, že je to rozumné místo, kde udělat čáru. Až bude archiv hotový, otevřeme ten soubor <text:span text:style-name="Strong_20_Emphasis">„zbývá dodělat“</text:span> a navážeme přesně od bodu <text:span text:style-name="Strong_20_Emphasis">2</text:span> (odeslaná objednávka). Nebudeme znovu řešit nic z toho, co jsme dnes dokončili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3T15:43:25.996279100</meta:creation-date>
    <dc:date>2026-07-03T15:45:50.396561700</dc:date>
    <meta:editing-duration>PT2M25S</meta:editing-duration>
    <meta:editing-cycles>1</meta:editing-cycles>
    <meta:document-statistic meta:table-count="0" meta:image-count="0" meta:object-count="0" meta:page-count="3" meta:paragraph-count="63" meta:word-count="285" meta:character-count="1737" meta:non-whitespace-character-count="1513"/>
    <meta:generator>LibreOffice/25.8.7.3$Windows_X86_64 LibreOffice_project/30742500f2d3eb4366ac312fa33d3dcabdb3eba5</meta:generator>
  </office:meta>
</office:document-meta>
</file>